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2.985cm"/>
    </style:style>
    <style:style style:name="Tabela1.B" style:family="table-column">
      <style:table-column-properties style:column-width="1.526cm"/>
    </style:style>
    <style:style style:name="Tabela1.C" style:family="table-column">
      <style:table-column-properties style:column-width="12.49cm"/>
    </style:style>
    <style:style style:name="Tabela1.A1" style:family="table-cell">
      <style:table-cell-properties style:vertical-align="middle" fo:padding="0.049cm" fo:border="none"/>
    </style:style>
    <style:style style:name="Tabela2" style:family="table">
      <style:table-properties style:width="12.065cm" table:align="left"/>
    </style:style>
    <style:style style:name="Tabela2.A" style:family="table-column">
      <style:table-column-properties style:column-width="2.14cm"/>
    </style:style>
    <style:style style:name="Tabela2.B" style:family="table-column">
      <style:table-column-properties style:column-width="1.416cm"/>
    </style:style>
    <style:style style:name="Tabela2.C" style:family="table-column">
      <style:table-column-properties style:column-width="5.308cm"/>
    </style:style>
    <style:style style:name="Tabela2.D" style:family="table-column">
      <style:table-column-properties style:column-width="3.201cm"/>
    </style:style>
    <style:style style:name="Tabela2.A1" style:family="table-cell">
      <style:table-cell-properties style:vertical-align="middle" fo:padding="0.049cm" fo:border="none"/>
    </style:style>
    <style:style style:name="Tabela2.5" style:family="table-row">
      <style:table-row-properties style:min-row-height="0.409cm"/>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able_20_Contents">
      <style:text-properties officeooo:rsid="0010c6c5" officeooo:paragraph-rsid="0010c6c5"/>
    </style:style>
    <style:style style:name="P8" style:family="paragraph" style:parent-style-name="Table_20_Contents">
      <style:text-properties officeooo:rsid="00113142" officeooo:paragraph-rsid="00113142"/>
    </style:style>
    <style:style style:name="P9" style:family="paragraph" style:parent-style-name="Standard">
      <style:text-properties officeooo:paragraph-rsid="00113142"/>
    </style:style>
    <style:style style:name="P10" style:family="paragraph" style:parent-style-name="Standard">
      <style:text-properties officeooo:paragraph-rsid="00128fd0"/>
    </style:style>
    <style:style style:name="T1" style:family="text">
      <style:text-properties officeooo:rsid="0013fc6f"/>
    </style:style>
    <style:style style:name="T2" style:family="text">
      <style:text-properties officeooo:rsid="00104cf0"/>
    </style:style>
    <style:style style:name="T3" style:family="text">
      <style:text-properties officeooo:rsid="0010c6c5"/>
    </style:style>
    <style:style style:name="T4" style:family="text">
      <style:text-properties fo:font-weight="bold" officeooo:rsid="00113142" style:font-weight-asian="bold" style:font-weight-complex="bold"/>
    </style:style>
    <style:style style:name="T5" style:family="text">
      <style:text-properties officeooo:rsid="00128fd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Objetivo Geral</text:h>
      <text:p text:style-name="Text_20_body">Desenvolver uma plataforma omnichannel que centralize os canais de atendimento da clínica, com funcionalidades específicas para pacientes, atendentes e gerentes.</text:p>
      <text:h text:style-name="Heading_20_4" text:outline-level="4">Perfis de Usuário</text:h>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Heading">Tipo de Usuário</text:p>
            </table:table-cell>
            <table:table-cell table:style-name="Tabela1.A1" office:value-type="string">
              <text:p text:style-name="Table_20_Heading">Acesso</text:p>
            </table:table-cell>
            <table:table-cell table:style-name="Tabela1.A1" office:value-type="string">
              <text:p text:style-name="Table_20_Heading">Funcionalidades</text:p>
            </table:table-cell>
          </table:table-row>
        </table:table-header-rows>
        <table:table-row>
          <table:table-cell table:style-name="Tabela1.A1" office:value-type="string">
            <text:p text:style-name="Table_20_Contents">Paciente</text:p>
          </table:table-cell>
          <table:table-cell table:style-name="Tabela1.A1" office:value-type="string">
            <text:p text:style-name="Table_20_Contents">Externo</text:p>
          </table:table-cell>
          <table:table-cell table:style-name="Tabela1.A1" office:value-type="string">
            <text:p text:style-name="Table_20_Contents">Escolha de canal, histórico de conversas, lembretes, login via e-mail.</text:p>
          </table:table-cell>
        </table:table-row>
        <table:table-row>
          <table:table-cell table:style-name="Tabela1.A1" office:value-type="string">
            <text:p text:style-name="Table_20_Contents">Atendente</text:p>
          </table:table-cell>
          <table:table-cell table:style-name="Tabela1.A1" office:value-type="string">
            <text:p text:style-name="Table_20_Contents">Interno</text:p>
          </table:table-cell>
          <table:table-cell table:style-name="Tabela1.A1" office:value-type="string">
            <text:p text:style-name="Table_20_Contents">Caixa unificada, histórico, registro de informações</text:p>
          </table:table-cell>
        </table:table-row>
        <table:table-row>
          <table:table-cell table:style-name="Tabela1.A1" office:value-type="string">
            <text:p text:style-name="Table_20_Contents">Gerente</text:p>
          </table:table-cell>
          <table:table-cell table:style-name="Tabela1.A1" office:value-type="string">
            <text:p text:style-name="Table_20_Contents">Interno</text:p>
          </table:table-cell>
          <table:table-cell table:style-name="Tabela1.A1" office:value-type="string">
            <text:p text:style-name="Table_20_Contents">Supervisão, relatórios, cadastro de <text:span text:style-name="T1">atendentes</text:span></text:p>
          </table:table-cell>
        </table:table-row>
      </table:table>
      <text:h text:style-name="Heading_20_3" text:outline-level="3">Credenciais Padrão</text:h>
      <text:list text:style-name="L1">
        <text:list-item>
          <text:p text:style-name="P1"><text:span text:style-name="Strong_20_Emphasis">Gerente</text:span></text:p>
          <text:list>
            <text:list-item>
              <text:p text:style-name="P1">E-mail: <text:span text:style-name="Source_20_Text"><text:span text:style-name="T2">joaoliveira822@gmail.com</text:span></text:span></text:p>
            </text:list-item>
            <text:list-item>
              <text:p text:style-name="P1">Senha: <text:span text:style-name="T2">joao</text:span><text:span text:style-name="Source_20_Text">1234</text:span><text:span text:style-name="Source_20_Text"><text:span text:style-name="T2">5</text:span></text:span></text:p>
            </text:list-item>
          </text:list>
        </text:list-item>
      </text:list>
      <text:h text:style-name="Heading_20_3" text:outline-level="3">Funcionalidades Principais</text:h>
      <text:h text:style-name="Heading_20_4" text:outline-level="4">1. Omnichannel</text:h>
      <text:list text:style-name="L2">
        <text:list-item>
          <text:list>
            <text:list-item>
              <text:p text:style-name="P2">Chat do site</text:p>
            </text:list-item>
          </text:list>
        </text:list-item>
      </text:list>
      <text:h text:style-name="Heading_20_4" text:outline-level="4">2. Painel do Atendente</text:h>
      <text:list text:style-name="L3">
        <text:list-item>
          <text:p text:style-name="P3">Caixa de entrada unificada</text:p>
        </text:list-item>
        <text:list-item>
          <text:p text:style-name="P3">Histórico de conversas</text:p>
        </text:list-item>
        <text:list-item>
          <text:p text:style-name="P3">Respostas rápidas</text:p>
        </text:list-item>
        <text:list-item>
          <text:p text:style-name="P3">Integração com agenda médica</text:p>
        </text:list-item>
      </text:list>
      <text:h text:style-name="Heading_20_4" text:outline-level="4">3. Painel do Gerente</text:h>
      <text:list text:style-name="L4">
        <text:list-item>
          <text:p text:style-name="P4">Dashboard de desempenho</text:p>
        </text:list-item>
        <text:list-item>
          <text:p text:style-name="P4">Supervisão em tempo real</text:p>
        </text:list-item>
        <text:list-item>
          <text:p text:style-name="P4">Gestão de filas e escalonamento</text:p>
        </text:list-item>
      </text:list>
      <text:h text:style-name="Heading_20_4" text:outline-level="4">4. Integrações</text:h>
      <text:list text:style-name="L5">
        <text:list-item>
          <text:p text:style-name="P5">Banco de dados relacional (PostgreSQL/MySQL)</text:p>
        </text:list-item>
        <text:list-item>
          <text:p text:style-name="P5">Agenda médica e prontuário eletrônico</text:p>
        </text:list-item>
        <text:list-item>
          <text:p text:style-name="P5">Ferramentas de lembrete automático (SMS, e-mail, WhatsApp)</text:p>
        </text:list-item>
      </text:list>
      <text:h text:style-name="Heading_20_3" text:outline-level="3">Requisitos Técnicos</text:h>
      <text:list text:style-name="L6">
        <text:list-item>
          <text:p text:style-name="P6">Backend escalável (Node.js, Python.)</text:p>
        </text:list-item>
        <text:list-item>
          <text:p text:style-name="P6">Frontend responsivo (React, Vue, Angular)</text:p>
        </text:list-item>
        <text:list-item>
          <text:p text:style-name="P6"><text:soft-page-break/>Sistema de permissões por papéis</text:p>
        </text:list-item>
        <text:list-item>
          <text:p text:style-name="P6">API RESTful</text:p>
        </text:list-item>
        <text:list-item>
          <text:p text:style-name="P6">Logs e auditoria</text:p>
        </text:list-item>
      </text:list>
      <text:h text:style-name="Heading_20_3" text:outline-level="3">📂 Registro de Atualizações</text:h>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office:value-type="string">
              <text:p text:style-name="Table_20_Heading">Data</text:p>
            </table:table-cell>
            <table:table-cell table:style-name="Tabela2.A1" office:value-type="string">
              <text:p text:style-name="Table_20_Heading">Versão</text:p>
            </table:table-cell>
            <table:table-cell table:style-name="Tabela2.A1" office:value-type="string">
              <text:p text:style-name="Table_20_Heading">Alteração</text:p>
            </table:table-cell>
            <table:table-cell table:style-name="Tabela2.A1" office:value-type="string">
              <text:p text:style-name="Table_20_Heading">Responsável</text:p>
            </table:table-cell>
          </table:table-row>
        </table:table-header-rows>
        <table:table-row>
          <table:table-cell table:style-name="Tabela2.A1" office:value-type="string">
            <text:p text:style-name="Table_20_Contents">03/09/2025</text:p>
          </table:table-cell>
          <table:table-cell table:style-name="Tabela2.A1" office:value-type="string">
            <text:p text:style-name="Table_20_Contents">1.0</text:p>
          </table:table-cell>
          <table:table-cell table:style-name="Tabela2.A1" office:value-type="string">
            <text:p text:style-name="Table_20_Contents">Criação do prompt inicial</text:p>
          </table:table-cell>
          <table:table-cell table:style-name="Tabela2.A1" office:value-type="string">
            <text:p text:style-name="Table_20_Contents">[<text:span text:style-name="T3">joão lucas</text:span>]</text:p>
          </table:table-cell>
        </table:table-row>
        <table:table-row>
          <table:table-cell table:style-name="Tabela2.A1" office:value-type="string">
            <text:p text:style-name="P7">03/09/2025</text:p>
          </table:table-cell>
          <table:table-cell table:style-name="Tabela2.A1" office:value-type="string">
            <text:p text:style-name="Table_20_Contents">1.1+</text:p>
          </table:table-cell>
          <table:table-cell table:style-name="Tabela2.A1" office:value-type="string">
            <text:p text:style-name="P7">Conexão com supabase</text:p>
          </table:table-cell>
          <table:table-cell table:style-name="Tabela2.A1" office:value-type="string">
            <text:p text:style-name="Table_20_Contents"/>
          </table:table-cell>
        </table:table-row>
        <table:table-row>
          <table:table-cell table:style-name="Tabela2.A1" office:value-type="string">
            <text:p text:style-name="P7">04/09/2025</text:p>
          </table:table-cell>
          <table:table-cell table:style-name="Tabela2.A1" office:value-type="string">
            <text:p text:style-name="P7">1.2+</text:p>
          </table:table-cell>
          <table:table-cell table:style-name="Tabela2.A1" office:value-type="string">
            <text:p text:style-name="P7">Configuração de autenticação</text:p>
          </table:table-cell>
          <table:table-cell table:style-name="Tabela2.A1" office:value-type="string">
            <text:p text:style-name="Table_20_Contents"/>
          </table:table-cell>
        </table:table-row>
        <table:table-row table:style-name="Tabela2.5">
          <table:table-cell table:style-name="Tabela2.A1" office:value-type="string">
            <text:p text:style-name="P7">05/09/2025</text:p>
          </table:table-cell>
          <table:table-cell table:style-name="Tabela2.A1" office:value-type="string">
            <text:p text:style-name="P7">1.3+</text:p>
          </table:table-cell>
          <table:table-cell table:style-name="Tabela2.A1" office:value-type="string">
            <text:p text:style-name="P7">Adição de funcionalidades</text:p>
          </table:table-cell>
          <table:table-cell table:style-name="Tabela2.A1" office:value-type="string">
            <text:p text:style-name="Table_20_Contents"/>
          </table:table-cell>
        </table:table-row>
        <table:table-row>
          <table:table-cell table:style-name="Tabela2.A1" office:value-type="string">
            <text:p text:style-name="P7">05/09/2025</text:p>
          </table:table-cell>
          <table:table-cell table:style-name="Tabela2.A1" office:value-type="string">
            <text:p text:style-name="P7">1.4+</text:p>
          </table:table-cell>
          <table:table-cell table:style-name="Tabela2.A1" office:value-type="string">
            <text:p text:style-name="P7">Adição de funcionalidades</text:p>
          </table:table-cell>
          <table:table-cell table:style-name="Tabela2.A1" office:value-type="string">
            <text:p text:style-name="Table_20_Contents"/>
          </table:table-cell>
        </table:table-row>
        <table:table-row>
          <table:table-cell table:style-name="Tabela2.A1" office:value-type="string">
            <text:p text:style-name="P7">06/09/2025</text:p>
          </table:table-cell>
          <table:table-cell table:style-name="Tabela2.A1" office:value-type="string">
            <text:p text:style-name="P7">1.5+</text:p>
          </table:table-cell>
          <table:table-cell table:style-name="Tabela2.A1" office:value-type="string">
            <text:p text:style-name="P7">Manutenção do banco de DDs</text:p>
          </table:table-cell>
          <table:table-cell table:style-name="Tabela2.A1" office:value-type="string">
            <text:p text:style-name="Table_20_Contents"/>
          </table:table-cell>
        </table:table-row>
        <table:table-row>
          <table:table-cell table:style-name="Tabela2.A1" office:value-type="string">
            <text:p text:style-name="P7">07/09/2025</text:p>
          </table:table-cell>
          <table:table-cell table:style-name="Tabela2.A1" office:value-type="string">
            <text:p text:style-name="P7">1.6+</text:p>
          </table:table-cell>
          <table:table-cell table:style-name="Tabela2.A1" office:value-type="string">
            <text:p text:style-name="P7">Adição de chat do site</text:p>
          </table:table-cell>
          <table:table-cell table:style-name="Tabela2.A1" office:value-type="string">
            <text:p text:style-name="Table_20_Contents"/>
          </table:table-cell>
        </table:table-row>
        <table:table-row>
          <table:table-cell table:style-name="Tabela2.A1" office:value-type="string">
            <text:p text:style-name="P7">07/09/2025</text:p>
          </table:table-cell>
          <table:table-cell table:style-name="Tabela2.A1" office:value-type="string">
            <text:p text:style-name="P7">1.7+</text:p>
          </table:table-cell>
          <table:table-cell table:style-name="Tabela2.A1" office:value-type="string">
            <text:p text:style-name="P7">Correção de erro do chat</text:p>
          </table:table-cell>
          <table:table-cell table:style-name="Tabela2.A1" office:value-type="string">
            <text:p text:style-name="Table_20_Contents"/>
          </table:table-cell>
        </table:table-row>
        <table:table-row>
          <table:table-cell table:style-name="Tabela2.A1" office:value-type="string">
            <text:p text:style-name="P8">09/09/2025</text:p>
          </table:table-cell>
          <table:table-cell table:style-name="Tabela2.A1" office:value-type="string">
            <text:p text:style-name="P8">1.8+</text:p>
          </table:table-cell>
          <table:table-cell table:style-name="Tabela2.A1" office:value-type="string">
            <text:p text:style-name="P8">Adição de dados reais</text:p>
          </table:table-cell>
          <table:table-cell table:style-name="Tabela2.A1" office:value-type="string">
            <text:p text:style-name="Table_20_Contents"/>
          </table:table-cell>
        </table:table-row>
      </table:table>
      <text:p text:style-name="Standard"/>
      <text:p text:style-name="P9"><text:span text:style-name="T4">Pronpts utilizados<text:line-break/></text:span>Objetivo: Criar uma aplicação web responsiva e escalável que centralize os canais de atendimento da clínica médica, com funcionalidades específicas para três tipos de usuários: Paciente, Atendente e Gerente.</text:p>
      <text:p text:style-name="P9"><text:s/>Perfis de Usuário Paciente (usuário externo) Pode se comunicar via WhatsApp, Instagram Direct, Facebook Messenger, e-mail e telefone. Recebe confirmações de agendamento e lembretes automáticos. Acessa histórico completo de conversas. Pode se cadastrar usando e-mail. </text:p>
      <text:p text:style-name="P9">Atendente (usuário interno) Acessa uma plataforma unificada para responder mensagens de pacientes. Visualiza histórico de conversas por paciente. Registra informações relevantes (exames entregues, agendamentos, observações). </text:p>
      <text:p text:style-name="P10">Gerente (usuário interno – nível superior) Gerencia fila de atendimentos e distribui chamados entre atendentes. Monitora produtividade (tempo médio de resposta, número de atendimentos, taxa de resolução). Pode intervir em atendimentos críticos. Acessa relatórios consolidados e dashboards de desempenho. Realiza cadastro de novos atendentes e gerentes. </text:p>
      <text:p text:style-name="P10"><text:span text:style-name="T5">]</text:span>Funcionalidades Principais Omnichannel Integração com APIs dos seguintes canais: WhatsApp Business API Facebook Messenger API Instagram Graph API SMTP/IMAP para e-mail Chat embutido no site painel do paciente precisa ser responsivo e intuitivo Painel do Atendente Caixa de entrada unificada com filtros por canal e paciente. Histórico de conversas. Respostas rápidas e templates. Integração com agenda médica (visualização e marcação de horários). Registro de informações clínicas e administrativas. 3. Painel do Gerente Dashboard com métricas: Número de atendimentos por atendente SLA de resposta Taxa de conversão em consultas Supervisão em tempo real: Visualização de conversas em andamento Redirecionamento de atendimentos Gestão de filas e escalonamento automático/manual Registro de logins, mensagens, agendamentos, histórico de atendimentos. Agenda Médica e Prontuário Eletrônico: Sincronização de horários e dados clínicos. Ferramentas de lembrete automático: Envio de SMS, e-mails e mensagens via WhatsApp com lembretes de consulta. Sistema de permissões baseado em papéis (Paciente, Atendente, Gerente). API RESTful para comunicação entre módulos. Logs e auditoria de ações administrativas. a tela de login deve permitir novos cadastros e disponibilizar três tipos de acesso, como paciente, como atendente e como gerente(!)</text:p>
      <text:p text:style-name="P10">configure a autenticação, crie as politicas de RLS, crie o banco de dados que armazenara os dados do aplicativo, faça o necessário para que o aplicativo fique o mais funcional possivel(!) no painel do gerente torne os botoes "novo atendente", "relatorio" e configuraçoes totalmente funcionais. em <text:soft-page-break/>novo atendente deve-se ter um formulario para cadastro do novo atendente que peça as seguintes informaçoes: nome completo, email, celular e senha. nas configurações de todos os painéis deve permitir a alteração das credenciais como nome, email e senha, alem de permitir a exclusão da conta caso o usuario queira.(!) </text:p>
      <text:p text:style-name="P10">no painel do gerente torne funcionais a Performance da Equipe. ao selecionar o atendente deve-se abrir uma tela que apresente as informaçoes do atendente, quantos e quais ele respondeu quais ainda estao sem resposta. no painel do paciente torne funcional o botao "nova mensagem", em nova mensagem o paciente utilizara o chat do próprio site, em Próximas Consultas ao apertar sobre ver todas as consultas ele possa ver todas as consutas agendadas, alem de poder ver as informaçoes sobre elas. torne funcional tambem Mensagens Recentes. no painel do atendente torne funcional o botao agendar consuta, enviar lembrete, ver agenda, conversas ativas, em coversas ativas o botão de responder deve ser funcional tambem.(!)</text:p>
      <text:p text:style-name="P10"><text:s/>adicione um chat próprio do site nos canais de atendimento, ja com banco de dados historico de mensagens completamente funcional e que ao o paciente mandar mensagem o atendente possa receber essa mensagem e respondela(!) </text:p>
      <text:p text:style-name="P10">parece que não posso enviar um mensagem ainda, da erro ao inicializar a conversa, verifique o erro e o que falta para que tudo funcione bem, e ja faça a manutenção do erro.(!) </text:p>
      <text:p text:style-name="P10">Remova todos os dados fictícios (mockados) da aplicação, incluindo pacientes, atendentes e gerentes que não estejam registrados no banco de dados real. Configure os painéis de cada tipo de usuário (paciente, atendente, gerente) para exibir exclusivamente os dados reais que estão armazenados no banco de dados da clínica. Certifique-se de que a fonte de dados utilizada seja a base de dados oficial da aplicação, e não dados de teste ou simulação. as mensagens que o paciente real enviar deve aparecer na caixa de mensagens do atendente real.(!)</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3T15:42:06.367629400</meta:creation-date>
    <dc:date>2025-09-15T16:19:28.958821500</dc:date>
    <meta:editing-duration>PT3H18M56S</meta:editing-duration>
    <meta:editing-cycles>2</meta:editing-cycles>
    <meta:generator>LibreOffice/25.2.5.2$Windows_X86_64 LibreOffice_project/03d19516eb2e1dd5d4ccd751a0d6f35f35e08022</meta:generator>
    <meta:document-statistic meta:table-count="2" meta:image-count="0" meta:object-count="0" meta:page-count="3" meta:paragraph-count="84" meta:word-count="908" meta:character-count="6191" meta:non-whitespace-character-count="5377"/>
  </office:meta>
</office:document-meta>
</file>